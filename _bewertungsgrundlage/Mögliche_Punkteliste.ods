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16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19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333333" fo:border-left="0.74pt solid #ff0000" fo:border-right="none" fo:border-top="0.74pt solid #ff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333333" fo:border-left="0.74pt solid #ff0000" fo:border-right="none" fo:border-top="none"/>
      <style:text-properties fo:color="#ffffff"/>
    </style:style>
    <style:style style:name="ce8" style:family="table-cell" style:parent-style-name="Default">
      <style:table-cell-properties fo:border-bottom="none" fo:background-color="#333333" fo:wrap-option="wrap" fo:border-left="0.74pt solid #ff0000" fo:border-right="none" fo:border-top="none"/>
      <style:text-properties fo:color="#ffffff"/>
    </style:style>
    <style:style style:name="ce9" style:family="table-cell" style:parent-style-name="Default">
      <style:table-cell-properties fo:border-bottom="0.74pt solid #ff0000" fo:background-color="#333333" fo:wrap-option="wrap" fo:border-left="0.74pt solid #ff0000" fo:border-right="none" fo:border-top="none"/>
      <style:text-properties fo:color="#ffffff"/>
    </style:style>
    <style:style style:name="ce10" style:family="table-cell" style:parent-style-name="Default">
      <style:table-cell-properties fo:background-color="transparent" fo:wrap-option="no-wrap" fo:border="none"/>
      <style:text-properties style:use-window-font-color="true"/>
    </style:style>
    <style:style style:name="ce11" style:family="table-cell" style:parent-style-name="Default">
      <style:table-cell-properties fo:border-bottom="none" fo:background-color="#333333" fo:border-left="none" fo:border-right="0.74pt solid #ff0000" fo:border-top="0.74pt solid #ff0000"/>
      <style:text-properties fo:color="#ffffff"/>
    </style:style>
    <style:style style:name="ce12" style:family="table-cell" style:parent-style-name="Default">
      <style:table-cell-properties fo:border-bottom="none" fo:background-color="#333333" fo:border-left="none" fo:border-right="0.74pt solid #ff0000" fo:border-top="none"/>
      <style:text-properties fo:color="#ffffff"/>
    </style:style>
    <style:style style:name="ce13" style:family="table-cell" style:parent-style-name="Default">
      <style:table-cell-properties fo:border-bottom="0.74pt solid #ff0000" fo:background-color="#333333" style:text-align-source="value-type" style:repeat-content="false" fo:wrap-option="wrap" fo:border-left="none" fo:border-right="0.74pt solid #ff0000" fo:border-top="none"/>
      <style:paragraph-properties fo:margin-left="0in"/>
      <style:text-properties fo:color="#ffffff"/>
    </style:style>
    <style:style style:name="ce14" style:family="table-cell" style:parent-style-name="Default">
      <style:table-cell-properties fo:border-bottom="none" fo:background-color="#333333" style:text-align-source="fix" style:repeat-content="false" fo:border-left="none" fo:border-right="0.74pt solid #ff0000" fo:border-top="non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style:text-align-source="value-type" style:repeat-content="false" fo:background-color="transparent" fo:wrap-option="no-wrap" fo:border="none"/>
      <style:paragraph-properties fo:margin-left="0in"/>
      <style:text-properties style:use-window-font-color="tru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/>
          <table:table-cell table:style-name="ce4" office:value-type="string" calcext:value-type="string">
            <text:p>Punkte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Standardfunktionalitä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Fenstergröß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Hintergrund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Beenden der Anwendung mit dem X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style-name="ce6" office:value-type="string" calcext:value-type="string">
            <text:p>Legende:</text:p>
          </table:table-cell>
          <table:table-cell table:style-name="ce11"/>
        </table:table-row>
        <table:table-row table:style-name="ro2">
          <table:table-cell office:value-type="string" calcext:value-type="string">
            <text:p>- Bitmaps werden als Sprite-Objekt geladen, konvertiert und skalier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style-name="ce7"/>
          <table:table-cell table:style-name="ce12"/>
        </table:table-row>
        <table:table-row table:style-name="ro1">
          <table:table-cell office:value-type="string" calcext:value-type="string">
            <text:p>- Bitmap Hintergrund mit Alpha-Kanal oder Color Ke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style-name="ce7" office:value-type="string" calcext:value-type="string">
            <text:p>Fettdruck</text:p>
          </table:table-cell>
          <table:table-cell table:style-name="ce12" office:value-type="string" calcext:value-type="string">
            <text:p>Überkategorie</text:p>
          </table:table-cell>
        </table:table-row>
        <table:table-row table:style-name="ro2">
          <table:table-cell office:value-type="string" calcext:value-type="string">
            <text:p>- Anwendung hat eine Ablaufgeschwindigkeit von 60 FP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style-name="ce8" office:value-type="string" calcext:value-type="string">
            <text:p>Normale Schrift &amp; führendes -</text:p>
          </table:table-cell>
          <table:table-cell table:style-name="ce12" office:value-type="string" calcext:value-type="string">
            <text:p>Funktionalität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Kursive Schrift &amp; führendes →</text:p>
          </table:table-cell>
          <table:table-cell table:style-name="ce13" office:value-type="string" calcext:value-type="string">
            <text:p>Unterfunktionalität/Spezifik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Grundprinz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Spieler Sprite startet unten in der Mitt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 Spieler Sprite hüpft hoch sobald er vom vorherigen Sprung auf dem Boden gelandet i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Gesamtpunkte:</text:p>
          </table:table-cell>
          <table:table-cell table:style-name="ce11"/>
        </table:table-row>
        <table:table-row table:style-name="ro2">
          <table:table-cell office:value-type="string" calcext:value-type="string">
            <text:p>- Der Punktestand auf Basis der Höhe wird auf dem Bildschirm angezeig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12"/>
        </table:table-row>
        <table:table-row table:style-name="ro1">
          <table:table-cell office:value-type="string" calcext:value-type="string">
            <text:p>- Das Sprite kann mit den Pfeiltasten gesteuert werde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style-name="ce7" office:value-type="string" calcext:value-type="string">
            <text:p>Punkte zu erreichen</text:p>
          </table:table-cell>
          <table:table-cell table:style-name="ce14" table:formula="of:=SUM([.C2:.C150])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table:style-name="ce9"/>
          <table:table-cell table:style-name="ce13"/>
        </table:table-row>
        <table:table-row table:style-name="ro1">
          <table:table-cell table:number-columns-repeated="5"/>
          <table:table-cell table:style-name="ce10"/>
          <table:table-cell table:style-name="ce15"/>
        </table:table-row>
        <table:table-row table:style-name="ro1">
          <table:table-cell table:style-name="ce1" office:value-type="string" calcext:value-type="string">
            <text:p>Menüfüh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Die Anwendung startet in einem Startbildschi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Der Startbildschirm beinhaltet einen Spielenknop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Der Startbildschirm beinhaltet einen Highsco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-&gt; Der Startbildschirm beinhaltet einen Knopf zum stoppen der Musi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Der Startbildschirm beinhaltet einen Quit-Knop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 Die Anwendung besitzt einen Pausebildschi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-&gt; Der Bildschirm wird aufgerufen durch den Tastendruck 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-&gt; Es wird der aktuelle Punktestand sowie der Highscore angezeig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Das Spiel kann neugestartet wer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-&gt; Das Spiel kann beendet werden <text:span text:style-name="T1">(</text:span>ggf. wird der Punktestand gespeichert<text:span text:style-name="T1">)</text:span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Das Spiel kann fortgesetzt wer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- Die Anwendung besitzt einen GameOver-Bildschi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-&gt; Es wird der aktuelle Punktestand sowie der Highscore angezeig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Das Spiel kann neugestartet wer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-&gt; Das Spiel kann beendet werden <text:span text:style-name="T1">(</text:span>ggf. wird der Punktestand gespeichert<text:span text:style-name="T1">)</text:span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Das Spiel hat eine zufällig generierte unendliche Kar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Es gibt Gegner, die einen versuchen abzuschieß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Es gibt verschiedene Arten von Plattform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Grün: Norm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Rot: Geht nach einem Sprung kaput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Blau: Bewegt sich von Rechts nach Link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- Punkte werden gespeichert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ou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Hintergrundsou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Kann im Startbildschirm deaktiviert wer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&gt; Lautstärke kann angepasst wer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Sprungsou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2:08:25.306311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1T12:08:35.532527510</dc:date>
    <meta:editing-duration>PT43M21S</meta:editing-duration>
    <meta:editing-cycles>5</meta:editing-cycles>
    <meta:generator>LibreOffice/7.3.1.3$Linux_X86_64 LibreOffice_project/30$Build-3</meta:generator>
    <meta:document-statistic meta:table-count="1" meta:cell-count="87" meta:object-count="0"/>
  </office:meta>
</office:document-meta>
</file>